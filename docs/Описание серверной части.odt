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d5cf5" officeooo:paragraph-rsid="001d5cf5"/>
    </style:style>
    <style:style style:name="P2" style:family="paragraph" style:parent-style-name="Standard">
      <style:text-properties officeooo:rsid="00235e17" officeooo:paragraph-rsid="00235e17"/>
    </style:style>
    <style:style style:name="P3" style:family="paragraph" style:parent-style-name="Standard" style:list-style-name="L1">
      <style:text-properties officeooo:rsid="00235e17" officeooo:paragraph-rsid="00235e17"/>
    </style:style>
    <style:style style:name="P4" style:family="paragraph" style:parent-style-name="Standard">
      <style:text-properties officeooo:rsid="00235e17" officeooo:paragraph-rsid="00235e17"/>
    </style:style>
    <style:style style:name="P5" style:family="paragraph" style:parent-style-name="Standard" style:list-style-name="L2">
      <style:text-properties officeooo:rsid="0024268e" officeooo:paragraph-rsid="0024268e"/>
    </style:style>
    <style:style style:name="P6" style:family="paragraph" style:parent-style-name="Standard" style:list-style-name="L2">
      <style:text-properties officeooo:rsid="002bf133" officeooo:paragraph-rsid="002bf133"/>
    </style:style>
    <style:style style:name="T1" style:family="text">
      <style:text-properties officeooo:rsid="0026a52f"/>
    </style:style>
    <style:style style:name="T2" style:family="text">
      <style:text-properties officeooo:rsid="002a8d7e"/>
    </style:style>
    <text:list-style style:name="L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Слои серверной части:</text:p>
      <text:list text:style-name="L1">
        <text:list-item>
          <text:p text:style-name="P3">Domain;</text:p>
        </text:list-item>
      </text:list>
      <text:p text:style-name="P2"/>
      <text:p text:style-name="P2">Domain слой для бизнес логики приложения, структура следующая:</text:p>
      <text:list text:style-name="L2">
        <text:list-item>
          <text:p text:style-name="P5">Common — базовые абстракции вроде Ag<text:span text:style-name="T1">g</text:span>r<text:span text:style-name="T1">e</text:span>gateRoot, Entity;</text:p>
        </text:list-item>
        <text:list-item>
          <text:p text:style-name="P5">Ag<text:span text:style-name="T1">g</text:span>r<text:span text:style-name="T1">e</text:span>gates — конкретные агрегаты и сущности <text:span text:style-name="T2">вроде Dormitory и Room;</text:span></text:p>
        </text:list-item>
        <text:list-item>
          <text:p text:style-name="P6">ValueObjects — объекты-значения, атомарные и неизменяемые, являются частью сущностный и агрегатов, например адрес.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2cm" fo:margin-right="0.499cm" fo:border="1.5pt solid #000000" fo:padding-top="1cm" fo:padding-bottom="1cm" fo:padding-left="0.499cm" fo:padding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21T13:11:06.532818240</meta:creation-date>
    <meta:generator>LibreOffice/24.2.7.2$Linux_X86_64 LibreOffice_project/420$Build-2</meta:generator>
    <meta:editing-duration>PT18M14S</meta:editing-duration>
    <meta:editing-cycles>9</meta:editing-cycles>
    <dc:title>Лист с рамкой</dc:title>
    <dc:date>2026-05-26T22:54:51.563277231</dc:date>
    <meta:document-statistic meta:table-count="0" meta:image-count="0" meta:object-count="0" meta:page-count="1" meta:paragraph-count="6" meta:word-count="43" meta:character-count="335" meta:non-whitespace-character-count="299"/>
    <meta:template xlink:type="simple" xlink:actuate="onRequest" xlink:title="Лист с рамкой" xlink:href="../../.config/libreoffice/4/user/template/Лист%20с%20рамкой.ott" meta:date="2026-01-21T13:11:05.918491423"/>
  </office:meta>
</office:document-meta>
</file>