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d5cf5" officeooo:paragraph-rsid="001d5cf5"/>
    </style:style>
    <style:style style:name="P2" style:family="paragraph" style:parent-style-name="Standard" style:list-style-name="L1">
      <style:paragraph-properties fo:line-height="150%"/>
      <style:text-properties officeooo:rsid="001d5cf5" officeooo:paragraph-rsid="001d5cf5"/>
    </style:style>
    <style:style style:name="P3" style:family="paragraph" style:parent-style-name="Standard" style:list-style-name="L1">
      <style:paragraph-properties fo:line-height="150%"/>
      <style:text-properties officeooo:rsid="001d5cf5" officeooo:paragraph-rsid="0025df45"/>
    </style:style>
    <style:style style:name="P4" style:family="paragraph" style:parent-style-name="Standard">
      <style:paragraph-properties fo:line-height="150%"/>
      <style:text-properties officeooo:rsid="001d5cf5" officeooo:paragraph-rsid="0025df45"/>
    </style:style>
    <style:style style:name="P5" style:family="paragraph" style:parent-style-name="Standard" style:list-style-name="L2">
      <style:paragraph-properties fo:line-height="150%"/>
      <style:text-properties officeooo:rsid="001d5cf5" officeooo:paragraph-rsid="0025df45"/>
    </style:style>
    <style:style style:name="P6" style:family="paragraph" style:parent-style-name="Standard" style:list-style-name="L3">
      <style:paragraph-properties fo:line-height="150%"/>
      <style:text-properties officeooo:rsid="001d5cf5" officeooo:paragraph-rsid="0025df45"/>
    </style:style>
    <style:style style:name="P7" style:family="paragraph" style:parent-style-name="Standard" style:list-style-name="L2">
      <style:paragraph-properties fo:line-height="150%"/>
      <style:text-properties officeooo:rsid="0034ca4d" officeooo:paragraph-rsid="0034ca4d"/>
    </style:style>
    <style:style style:name="P8" style:family="paragraph" style:parent-style-name="Standard" style:list-style-name="L3">
      <style:paragraph-properties fo:line-height="150%"/>
      <style:text-properties officeooo:rsid="003b0863" officeooo:paragraph-rsid="003b0863"/>
    </style:style>
    <style:style style:name="P9" style:family="paragraph" style:parent-style-name="Standard">
      <style:paragraph-properties fo:line-height="150%"/>
      <style:text-properties officeooo:rsid="003b0863" officeooo:paragraph-rsid="003b0863"/>
    </style:style>
    <style:style style:name="P10" style:family="paragraph" style:parent-style-name="Standard" style:list-style-name="L4">
      <style:paragraph-properties fo:line-height="150%"/>
      <style:text-properties officeooo:rsid="00462d68" officeooo:paragraph-rsid="00462d6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щежитие — зданием используемое для расселения студентов. Обладает следующими атрибутами:</text:p>
      <text:list text:style-name="L1">
        <text:list-item>
          <text:p text:style-name="P2">Название;</text:p>
        </text:list-item>
        <text:list-item>
          <text:p text:style-name="P3">Адрес — город, улица, дом;</text:p>
        </text:list-item>
        <text:list-item>
          <text:p text:style-name="P3">Количество этажей.</text:p>
        </text:list-item>
      </text:list>
      <text:p text:style-name="P4">Комната — ячейка общежития, в ней проживают студенты. Обладает следующими атрибутами</text:p>
      <text:list text:style-name="L2">
        <text:list-item>
          <text:p text:style-name="P5">Вместимость — сколько людей может максимум проживать в комнате;</text:p>
        </text:list-item>
        <text:list-item>
          <text:p text:style-name="P5">Гендер — показывает какого пола должны быть проживающие в этой комнате. Нельзя заселить человека неподходящего пола;</text:p>
        </text:list-item>
        <text:list-item>
          <text:p text:style-name="P7">Номер этажа — на каком этаже общежития расположена комната</text:p>
        </text:list-item>
        <text:list-item>
          <text:p text:style-name="P5">Имя комнаты — норме или название используемое для обозначения комнаты для рядовых пользователей.</text:p>
        </text:list-item>
      </text:list>
      <text:p text:style-name="P4">Студент — проживает в комнате. Обладает следующими атрибутами:</text:p>
      <text:list text:style-name="L3">
        <text:list-item>
          <text:p text:style-name="P6">Фамилия;</text:p>
        </text:list-item>
        <text:list-item>
          <text:p text:style-name="P8">Имя;</text:p>
        </text:list-item>
        <text:list-item>
          <text:p text:style-name="P8">Отчество;</text:p>
        </text:list-item>
        <text:list-item>
          <text:p text:style-name="P8">Дата рождения.</text:p>
        </text:list-item>
      </text:list>
      <text:p text:style-name="P9">Заселение — запись о том какой студент, когда и в какую комнату заселился. Содержит следующие атрибуты.</text:p>
      <text:list text:style-name="L4">
        <text:list-item>
          <text:p text:style-name="P10">Комната;</text:p>
        </text:list-item>
        <text:list-item>
          <text:p text:style-name="P10">Студент;</text:p>
        </text:list-item>
        <text:list-item>
          <text:p text:style-name="P10">Дата заселения;</text:p>
        </text:list-item>
        <text:list-item>
          <text:p text:style-name="P10">Дата выселения.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1.5pt solid #000000" fo:padding-top="1cm" fo:padding-bottom="1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3:11:06.532818240</meta:creation-date>
    <meta:generator>LibreOffice/24.2.7.2$Linux_X86_64 LibreOffice_project/420$Build-2</meta:generator>
    <meta:editing-duration>PT29M1S</meta:editing-duration>
    <meta:editing-cycles>37</meta:editing-cycles>
    <dc:title>Лист с рамкой</dc:title>
    <dc:date>2026-05-26T19:50:02.602449844</dc:date>
    <meta:document-statistic meta:table-count="0" meta:image-count="0" meta:object-count="0" meta:page-count="1" meta:paragraph-count="19" meta:word-count="117" meta:character-count="836" meta:non-whitespace-character-count="744"/>
    <meta:template xlink:type="simple" xlink:actuate="onRequest" xlink:title="Лист с рамкой" xlink:href="../../.config/libreoffice/4/user/template/Лист%20с%20рамкой.ott" meta:date="2026-01-21T13:11:05.918491423"/>
  </office:meta>
</office:document-meta>
</file>